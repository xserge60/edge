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A000001BA4D0EA8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7.78cm" svg:height="15.592cm" svg:x="1.635cm" svg:y="7.053cm">
          <draw:image xlink:href="Pictures/10000001000001BA000001BA4D0EA8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23T14:52:46.814000000</dc:date>
    <meta:editing-duration>PT21S</meta:editing-duration>
    <meta:editing-cycles>1</meta:editing-cycles>
    <meta:document-statistic meta:object-count="1"/>
    <meta:generator>LibreOffice/24.8.5.2$Windows_X86_64 LibreOffice_project/fddf2685c70b461e7832239a0162a77216259f22</meta:generator>
  </office:meta>
</office:document-meta>
</file>